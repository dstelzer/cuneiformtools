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ZL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Functional?</text:p>
          </table:table-cell>
          <table:table-cell table:style-name="Default" office:value-type="string" calcext:value-type="string">
            <text:p>Presentation?</text:p>
          </table:table-cell>
          <table:table-cell office:value-type="string" calcext:value-type="string">
            <text:p>Legit?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ÙR</text:p>
          </table:table-cell>
          <table:table-cell office:value-type="boolean" office:boolean-value="true" calcext:value-type="boolean">
            <text:p>TRU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P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ILA4</text:p>
          </table:table-cell>
          <table:table-cell office:value-type="boolean" office:boolean-value="true" calcext:value-type="boolean">
            <text:p>TRU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CGAB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KU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old – look at this one!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ÍL</text:p>
          </table:table-cell>
          <table:table-cell office:value-type="boolean" office:boolean-value="true" calcext:value-type="boolean">
            <text:p>TRU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AD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nt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B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ains IP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Z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nt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URU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malous, with ?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ÍL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nt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nt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U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n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U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usual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ALA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nt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nt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UMU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nt 4 – look at thi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ÚL+KU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IDIGN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I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exampl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IM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 abov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I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nt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HUL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ains UR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IKIL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 be corrected?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FU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nt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WI+IP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ains IP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É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12:35:23.539099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0:23.290972301</meta:creation-date>
    <dc:date>2024-09-15T17:31:06.548660387</dc:date>
    <meta:editing-duration>PT4H21M56S</meta:editing-duration>
    <meta:editing-cycles>25</meta:editing-cycles>
    <meta:generator>LibreOffice/24.2.5.2$Linux_X86_64 LibreOffice_project/420$Build-2</meta:generator>
    <meta:document-statistic meta:table-count="1" meta:cell-count="162" meta:object-count="0"/>
  </office:meta>
</office:document-meta>
</file>